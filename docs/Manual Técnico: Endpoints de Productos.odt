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officeooo:rsid="000b78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Manual Técnico: Endpoints de Productos (<text:span text:style-name="T1">api/productos</text:span><text:span text:style-name="Source_20_Text">/productos.py</text:span>)</text:h>
      <text:h text:style-name="Heading_20_2" text:outline-level="2">1. 📌 Descripción General</text:h>
      <text:p text:style-name="Text_20_body">Este archivo define los <text:span text:style-name="Strong_20_Emphasis">endpoints (rutas HTTP)</text:span> para el módulo de productos usando FastAPI.</text:p>
      <text:p text:style-name="Text_20_body">👉 Es la capa que expone tu backend al exterior (frontend, Postman, apps).</text:p>
      <text:h text:style-name="Heading_20_2" text:outline-level="2">2. 🧠 ¿Qué son los Endpoints?</text:h>
      <text:p text:style-name="Text_20_body">Son funciones que responden a peticiones HTTP:</text:p>
      <text:list text:style-name="L1">
        <text:list-item>
          <text:p text:style-name="P2">GET → consultar</text:p>
        </text:list-item>
        <text:list-item>
          <text:p text:style-name="P2">POST → crear</text:p>
        </text:list-item>
        <text:list-item>
          <text:p text:style-name="P2">PUT → actualizar</text:p>
        </text:list-item>
        <text:list-item>
          <text:p text:style-name="P2">DELETE → eliminar</text:p>
        </text:list-item>
      </text:list>
      <text:h text:style-name="Heading_20_2" text:outline-level="2">3. ⚙️ Importaciones</text:h>
      <text:p text:style-name="Preformatted_20_Text"><text:span text:style-name="Source_20_Text">from fastapi import APIRouter, Depends, Query, status</text:span></text:p>
      <text:p text:style-name="Preformatted_20_Text"><text:span text:style-name="Source_20_Text">from sqlalchemy.orm import Session</text:span></text:p>
      <text:p text:style-name="Preformatted_20_Text"><text:span text:style-name="Source_20_Text">from typing import List</text:span></text:p>
      <text:p text:style-name="Preformatted_20_Text"/>
      <text:p text:style-name="Preformatted_20_Text"><text:span text:style-name="Source_20_Text">from app.core.database import get_db</text:span></text:p>
      <text:p text:style-name="Preformatted_20_Text"><text:span text:style-name="Source_20_Text">from app.services.producto_service import ProductoService</text:span></text:p>
      <text:p text:style-name="P1"><text:span text:style-name="Source_20_Text">from app.schemas.producto import ProductoCreate, ProductoUpdate, ProductoResponse</text:span></text:p>
      <text:h text:style-name="Heading_20_3" text:outline-level="3">Explicación:</text:h>
      <text:list text:style-name="L2">
        <text:list-item>
          <text:p text:style-name="P3"><text:span text:style-name="Source_20_Text">APIRouter</text:span>: agrupa rutas</text:p>
        </text:list-item>
        <text:list-item>
          <text:p text:style-name="P3"><text:span text:style-name="Source_20_Text">Depends</text:span>: inyección de dependencias</text:p>
        </text:list-item>
        <text:list-item>
          <text:p text:style-name="P3"><text:span text:style-name="Source_20_Text">Query</text:span>: validación de parámetros</text:p>
        </text:list-item>
        <text:list-item>
          <text:p text:style-name="P3"><text:span text:style-name="Source_20_Text">Session</text:span>: conexión BD</text:p>
        </text:list-item>
        <text:list-item>
          <text:p text:style-name="P3"><text:span text:style-name="Source_20_Text">Service</text:span>: lógica de negocio</text:p>
        </text:list-item>
      </text:list>
      <text:h text:style-name="Heading_20_2" text:outline-level="2">4. 🧱 Router</text:h>
      <text:p text:style-name="P1"><text:span text:style-name="Source_20_Text">router = APIRouter(prefix="/productos", tags=["Productos"])</text:span></text:p>
      <text:p text:style-name="Text_20_body"><text:soft-page-break/>👉 Todas las rutas empiezan con <text:span text:style-name="Source_20_Text">/productos</text:span></text:p>
      <text:h text:style-name="Heading_20_2" text:outline-level="2">5. ➕ Crear Producto (POST)</text:h>
      <text:p text:style-name="P1"><text:span text:style-name="Source_20_Text">@router.post("/", response_model=ProductoResponse, status_code=status.HTTP_201_CREATED)</text:span></text:p>
      <text:h text:style-name="Heading_20_3" text:outline-level="3">Función:</text:h>
      <text:p text:style-name="P1"><text:span text:style-name="Source_20_Text">def crear_producto(producto: ProductoCreate, db: Session = Depends(get_db)):</text:span></text:p>
      <text:h text:style-name="Heading_20_3" text:outline-level="3">Flujo:</text:h>
      <text:list text:style-name="L3">
        <text:list-item>
          <text:p text:style-name="P4">Recibe JSON</text:p>
        </text:list-item>
        <text:list-item>
          <text:p text:style-name="P4">Valida con Pydantic</text:p>
        </text:list-item>
        <text:list-item>
          <text:p text:style-name="P4">Llama al Service</text:p>
        </text:list-item>
        <text:list-item>
          <text:p text:style-name="P4">Retorna respuesta</text:p>
        </text:list-item>
      </text:list>
      <text:h text:style-name="Heading_20_2" text:outline-level="2">6. 🔍 Obtener Producto (GET por ID)</text:h>
      <text:p text:style-name="P1"><text:span text:style-name="Source_20_Text">@router.get("/{producto_id}", response_model=ProductoResponse)</text:span></text:p>
      <text:list text:style-name="L4">
        <text:list-item>
          <text:p text:style-name="P5">Recibe ID en la URL</text:p>
        </text:list-item>
        <text:list-item>
          <text:p text:style-name="P5">Retorna un producto</text:p>
        </text:list-item>
      </text:list>
      <text:h text:style-name="Heading_20_2" text:outline-level="2">7. 📋 Listar Productos (GET)</text:h>
      <text:p text:style-name="P1"><text:span text:style-name="Source_20_Text">@router.get("/", response_model=List[ProductoResponse])</text:span></text:p>
      <text:h text:style-name="Heading_20_3" text:outline-level="3">Parámetros:</text:h>
      <text:p text:style-name="Preformatted_20_Text"><text:span text:style-name="Source_20_Text">skip: int = Query(0, ge=0)</text:span></text:p>
      <text:p text:style-name="P1"><text:span text:style-name="Source_20_Text">limit: int = Query(100, ge=1, le=1000)</text:span></text:p>
      <text:p text:style-name="Text_20_body">📌 Explicación:</text:p>
      <text:list text:style-name="L5">
        <text:list-item>
          <text:p text:style-name="P6"><text:span text:style-name="Source_20_Text">skip</text:span>: desde dónde empezar</text:p>
        </text:list-item>
        <text:list-item>
          <text:p text:style-name="P6"><text:span text:style-name="Source_20_Text">limit</text:span>: cuántos traer</text:p>
        </text:list-item>
        <text:list-item>
          <text:p text:style-name="P6"><text:span text:style-name="Source_20_Text">ge</text:span>: mínimo</text:p>
        </text:list-item>
        <text:list-item>
          <text:p text:style-name="P6"><text:span text:style-name="Source_20_Text">le</text:span>: máximo</text:p>
        </text:list-item>
      </text:list>
      <text:h text:style-name="Heading_20_2" text:outline-level="2">8. 🔄 Actualizar Producto (PUT)</text:h>
      <text:p text:style-name="P1"><text:span text:style-name="Source_20_Text">@router.put("/{producto_id}", response_model=ProductoResponse)</text:span></text:p>
      <text:h text:style-name="Heading_20_3" text:outline-level="3"><text:soft-page-break/>Función:</text:h>
      <text:p text:style-name="P1"><text:span text:style-name="Source_20_Text">def actualizar_producto(producto_id: int, producto: ProductoUpdate, db: Session = Depends(get_db)):</text:span></text:p>
      <text:p text:style-name="Text_20_body">👉 Recibe ID + datos nuevos</text:p>
      <text:h text:style-name="Heading_20_2" text:outline-level="2">9. ❌ Eliminar Producto (DELETE)</text:h>
      <text:p text:style-name="P1"><text:span text:style-name="Source_20_Text">@router.delete("/{producto_id}", status_code=status.HTTP_204_NO_CONTENT)</text:span></text:p>
      <text:h text:style-name="Heading_20_3" text:outline-level="3">Característica:</text:h>
      <text:list text:style-name="L6">
        <text:list-item>
          <text:p text:style-name="P7">No retorna contenido</text:p>
        </text:list-item>
      </text:list>
      <text:p text:style-name="P1"><text:span text:style-name="Source_20_Text">return None</text:span></text:p>
      <text:h text:style-name="Heading_20_2" text:outline-level="2">10. 🔌 Dependencias (<text:span text:style-name="Source_20_Text">Depends</text:span>)</text:h>
      <text:p text:style-name="P1"><text:span text:style-name="Source_20_Text">db: Session = Depends(get_db)</text:span></text:p>
      <text:p text:style-name="Text_20_body">👉 FastAPI inyecta automáticamente la conexión a BD</text:p>
      <text:h text:style-name="Heading_20_2" text:outline-level="2">11. 🔄 Flujo Completo</text:h>
      <text:list text:style-name="L7">
        <text:list-item>
          <text:p text:style-name="P8">Cliente hace request</text:p>
        </text:list-item>
        <text:list-item>
          <text:p text:style-name="P8">Endpoint recibe</text:p>
        </text:list-item>
        <text:list-item>
          <text:p text:style-name="P8">Pydantic valida</text:p>
        </text:list-item>
        <text:list-item>
          <text:p text:style-name="P8">Service ejecuta lógica</text:p>
        </text:list-item>
        <text:list-item>
          <text:p text:style-name="P8">Repository accede a BD</text:p>
        </text:list-item>
        <text:list-item>
          <text:p text:style-name="P8">Respuesta vuelve</text:p>
        </text:list-item>
      </text:list>
      <text:h text:style-name="Heading_20_2" text:outline-level="2">12. 🧪 Práctica: Probar Endpoints</text:h>
      <text:h text:style-name="Heading_20_3" text:outline-level="3">Crear producto (POST)</text:h>
      <text:p text:style-name="Preformatted_20_Text"><text:span text:style-name="Source_20_Text">{</text:span></text:p>
      <text:p text:style-name="Preformatted_20_Text"><text:span text:style-name="Source_20_Text"><text:s text:c="2"/>"nombre": "Mouse",</text:span></text:p>
      <text:p text:style-name="Preformatted_20_Text"><text:span text:style-name="Source_20_Text"><text:s text:c="2"/>"codigo": "M001",</text:span></text:p>
      <text:p text:style-name="Preformatted_20_Text"><text:span text:style-name="Source_20_Text"><text:s text:c="2"/>"precio": 150</text:span></text:p>
      <text:p text:style-name="P1"><text:span text:style-name="Source_20_Text">}</text:span></text:p>
      <text:h text:style-name="Heading_20_3" text:outline-level="3">Obtener producto (GET)</text:h>
      <text:p text:style-name="P1"><text:span text:style-name="Source_20_Text">GET /productos/1</text:span></text:p>
      <text:h text:style-name="Heading_20_3" text:outline-level="3"><text:soft-page-break/>Listar productos</text:h>
      <text:p text:style-name="P1"><text:span text:style-name="Source_20_Text">GET /productos?skip=0&amp;limit=10</text:span></text:p>
      <text:h text:style-name="Heading_20_3" text:outline-level="3">Actualizar producto</text:h>
      <text:p text:style-name="Preformatted_20_Text"><text:span text:style-name="Source_20_Text">{</text:span></text:p>
      <text:p text:style-name="Preformatted_20_Text"><text:span text:style-name="Source_20_Text"><text:s text:c="2"/>"precio": 200</text:span></text:p>
      <text:p text:style-name="P1"><text:span text:style-name="Source_20_Text">}</text:span></text:p>
      <text:h text:style-name="Heading_20_3" text:outline-level="3">Eliminar producto</text:h>
      <text:p text:style-name="P1"><text:span text:style-name="Source_20_Text">DELETE /productos/1</text:span></text:p>
      <text:h text:style-name="Heading_20_2" text:outline-level="2">13. ⚠️ Errores Comunes</text:h>
      <text:p text:style-name="Text_20_body">❌ No usar Depends<text:line-break/>❌ No validar parámetros<text:line-break/>❌ No manejar errores en Service</text:p>
      <text:h text:style-name="Heading_20_2" text:outline-level="2">14. 🧠 Buenas Prácticas</text:h>
      <text:list text:style-name="L8">
        <text:list-item>
          <text:p text:style-name="P9">Mantener endpoints simples</text:p>
        </text:list-item>
        <text:list-item>
          <text:p text:style-name="P9">Toda lógica va en Service</text:p>
        </text:list-item>
        <text:list-item>
          <text:p text:style-name="P9">Validación en Schemas</text:p>
        </text:list-item>
      </text:list>
      <text:h text:style-name="Heading_20_2" text:outline-level="2">15. 🚀 Ejercicio</text:h>
      <text:p text:style-name="Text_20_body">Agrega un endpoint:</text:p>
      <text:p text:style-name="P1"><text:span text:style-name="Source_20_Text">GET /productos/codigo/{codigo}</text:span></text:p>
      <text:p text:style-name="Text_20_body">👉 Debe buscar por código</text:p>
      <text:h text:style-name="Heading_20_2" text:outline-level="2">16. 📌 Conclusión</text:h>
      <text:p text:style-name="Text_20_body">Este archivo conecta todo el sistema.</text:p>
      <text:p text:style-name="Text_20_body">👉 Es la puerta de entrada a tu backend.</text:p>
      <text:p text:style-name="Text_20_body">Dominar endpoints = backend listo para producció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7:15:02.562354597</meta:creation-date>
    <dc:date>2026-04-23T17:17:58.477523217</dc:date>
    <meta:editing-duration>PT2M56S</meta:editing-duration>
    <meta:editing-cycles>1</meta:editing-cycles>
    <meta:document-statistic meta:table-count="0" meta:image-count="0" meta:object-count="0" meta:page-count="4" meta:paragraph-count="100" meta:word-count="411" meta:character-count="2918" meta:non-whitespace-character-count="2628"/>
    <meta:generator>LibreOffice/24.2.7.2$Linux_X86_64 LibreOffice_project/420$Build-2</meta:generator>
  </office:meta>
</office:document-meta>
</file>