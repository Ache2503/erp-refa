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Técnico: Repository de Productos (<text:span text:style-name="Source_20_Text">producto_repository.py</text:span>)</text:h>
      <text:h text:style-name="Heading_20_2" text:outline-level="2">1. 📌 Descripción General</text:h>
      <text:p text:style-name="Text_20_body">Este archivo implementa el patrón <text:span text:style-name="Strong_20_Emphasis">Repository</text:span>, que se encarga de manejar todas las operaciones de base de datos relacionadas con productos.</text:p>
      <text:p text:style-name="Text_20_body">👉 Su objetivo es separar la lógica de acceso a datos del resto del sistema.</text:p>
      <text:h text:style-name="Heading_20_2" text:outline-level="2">2. 🧠 ¿Qué es un Repository?</text:h>
      <text:p text:style-name="Text_20_body">Es una capa que:</text:p>
      <text:list text:style-name="L1">
        <text:list-item>
          <text:p text:style-name="P2">Encapsula consultas a la base de datos</text:p>
        </text:list-item>
        <text:list-item>
          <text:p text:style-name="P2">Evita escribir SQL en toda la aplicación</text:p>
        </text:list-item>
        <text:list-item>
          <text:p text:style-name="P2">Hace el código más limpio y mantenible</text:p>
        </text:list-item>
      </text:list>
      <text:h text:style-name="Heading_20_2" text:outline-level="2">3. ⚙️ Importaciones</text:h>
      <text:p text:style-name="Preformatted_20_Text"><text:span text:style-name="Source_20_Text">from typing import List, Optional</text:span></text:p>
      <text:p text:style-name="Preformatted_20_Text"><text:span text:style-name="Source_20_Text">from sqlalchemy.orm import Session</text:span></text:p>
      <text:p text:style-name="Preformatted_20_Text"><text:span text:style-name="Source_20_Text">from app.models.productos import Productos</text:span></text:p>
      <text:p text:style-name="P1"><text:span text:style-name="Source_20_Text">from app.schemas.producto import ProductoCreate, ProductoUpdate</text:span></text:p>
      <text:h text:style-name="Heading_20_3" text:outline-level="3">Explicación:</text:h>
      <text:list text:style-name="L2">
        <text:list-item>
          <text:p text:style-name="P3"><text:span text:style-name="Source_20_Text">Session</text:span>: conexión a la base de datos</text:p>
        </text:list-item>
        <text:list-item>
          <text:p text:style-name="P3"><text:span text:style-name="Source_20_Text">Productos</text:span>: modelo ORM</text:p>
        </text:list-item>
        <text:list-item>
          <text:p text:style-name="P3"><text:span text:style-name="Source_20_Text">ProductoCreate/Update</text:span>: validaciones</text:p>
        </text:list-item>
      </text:list>
      <text:h text:style-name="Heading_20_2" text:outline-level="2">4. 🧱 Clase Principal</text:h>
      <text:p text:style-name="P1"><text:span text:style-name="Source_20_Text">class ProductoRepository:</text:span></text:p>
      <text:p text:style-name="Text_20_body">👉 Contiene todos los métodos CRUD</text:p>
      <text:h text:style-name="Heading_20_2" text:outline-level="2">5. 🔌 Constructor</text:h>
      <text:p text:style-name="Preformatted_20_Text"><text:span text:style-name="Source_20_Text">def __init__(self, db: Session):</text:span></text:p>
      <text:p text:style-name="P1"><text:span text:style-name="Source_20_Text"><text:s text:c="4"/>self.db = db</text:span></text:p>
      <text:list text:style-name="L3">
        <text:list-item>
          <text:p text:style-name="P4">Recibe la sesión de base de datos</text:p>
        </text:list-item>
        <text:list-item>
          <text:p text:style-name="P4"><text:soft-page-break/>Permite ejecutar consultas</text:p>
        </text:list-item>
      </text:list>
      <text:h text:style-name="Heading_20_2" text:outline-level="2">6. 🔍 Obtener por ID</text:h>
      <text:p text:style-name="Preformatted_20_Text"><text:span text:style-name="Source_20_Text">def get_by_id(self, producto_id: int) -&gt; Optional[Productos]:</text:span></text:p>
      <text:p text:style-name="P1"><text:span text:style-name="Source_20_Text"><text:s text:c="4"/>return self.db.query(Productos).filter(Productos.id_producto == producto_id).first()</text:span></text:p>
      <text:h text:style-name="Heading_20_3" text:outline-level="3">¿Qué hace?</text:h>
      <text:list text:style-name="L4">
        <text:list-item>
          <text:p text:style-name="P5">Busca un producto por ID</text:p>
        </text:list-item>
        <text:list-item>
          <text:p text:style-name="P5">Retorna el primero encontrado</text:p>
        </text:list-item>
      </text:list>
      <text:h text:style-name="Heading_20_2" text:outline-level="2">7. 🔍 Obtener por Código</text:h>
      <text:p text:style-name="P1"><text:span text:style-name="Source_20_Text">def get_by_codigo(self, codigo: str) -&gt; Optional[Productos]:</text:span></text:p>
      <text:list text:style-name="L5">
        <text:list-item>
          <text:p text:style-name="P6">Busca un producto por su código único</text:p>
        </text:list-item>
      </text:list>
      <text:h text:style-name="Heading_20_2" text:outline-level="2">8. 📋 Obtener todos</text:h>
      <text:p text:style-name="P1"><text:span text:style-name="Source_20_Text">def get_all(self, skip: int = 0, limit: int = 100) -&gt; List[Productos]:</text:span></text:p>
      <text:h text:style-name="Heading_20_3" text:outline-level="3">Funcionalidad:</text:h>
      <text:list text:style-name="L6">
        <text:list-item>
          <text:p text:style-name="P7"><text:span text:style-name="Source_20_Text">skip</text:span>: omite registros (paginación)</text:p>
        </text:list-item>
        <text:list-item>
          <text:p text:style-name="P7"><text:span text:style-name="Source_20_Text">limit</text:span>: límite de resultados</text:p>
        </text:list-item>
      </text:list>
      <text:h text:style-name="Heading_20_2" text:outline-level="2">9. ➕ Crear Producto</text:h>
      <text:p text:style-name="P1"><text:span text:style-name="Source_20_Text">def create(self, producto_data: ProductoCreate) -&gt; Productos:</text:span></text:p>
      <text:h text:style-name="Heading_20_3" text:outline-level="3">Flujo:</text:h>
      <text:p text:style-name="P1"><text:span text:style-name="Source_20_Text">db_producto = Productos(**producto_data.model_dump())</text:span></text:p>
      <text:list text:style-name="L7">
        <text:list-item>
          <text:p text:style-name="P8">Convierte esquema Pydantic a modelo ORM</text:p>
        </text:list-item>
      </text:list>
      <text:p text:style-name="P1"><text:span text:style-name="Source_20_Text">self.db.add(db_producto)</text:span></text:p>
      <text:list text:style-name="L8">
        <text:list-item>
          <text:p text:style-name="P9">Agrega a sesión</text:p>
        </text:list-item>
      </text:list>
      <text:p text:style-name="P1"><text:span text:style-name="Source_20_Text">self.db.commit()</text:span></text:p>
      <text:list text:style-name="L9">
        <text:list-item>
          <text:p text:style-name="P10">Guarda en BD</text:p>
        </text:list-item>
      </text:list>
      <text:p text:style-name="P1"><text:span text:style-name="Source_20_Text">self.db.refresh(db_producto)</text:span></text:p>
      <text:list text:style-name="L10">
        <text:list-item>
          <text:p text:style-name="P11"><text:soft-page-break/>Refresca datos</text:p>
        </text:list-item>
      </text:list>
      <text:h text:style-name="Heading_20_2" text:outline-level="2">10. 🔄 Actualizar Producto</text:h>
      <text:p text:style-name="P1"><text:span text:style-name="Source_20_Text">def update(self, producto: Productos, update_data: ProductoUpdate) -&gt; Productos:</text:span></text:p>
      <text:h text:style-name="Heading_20_3" text:outline-level="3">Paso clave:</text:h>
      <text:p text:style-name="P1"><text:span text:style-name="Source_20_Text">update_dict = update_data.model_dump(exclude_unset=True)</text:span></text:p>
      <text:p text:style-name="Text_20_body">👉 Solo actualiza campos enviados</text:p>
      <text:p text:style-name="Preformatted_20_Text"><text:span text:style-name="Source_20_Text">for field, value in update_dict.items():</text:span></text:p>
      <text:p text:style-name="P1"><text:span text:style-name="Source_20_Text"><text:s text:c="4"/>setattr(producto, field, value)</text:span></text:p>
      <text:p text:style-name="Text_20_body">👉 Actualiza dinámicamente</text:p>
      <text:h text:style-name="Heading_20_2" text:outline-level="2">11. ❌ Eliminar Producto</text:h>
      <text:p text:style-name="P1"><text:span text:style-name="Source_20_Text">def delete(self, producto: Productos) -&gt; None:</text:span></text:p>
      <text:list text:style-name="L11">
        <text:list-item>
          <text:p text:style-name="P12">Elimina el objeto</text:p>
        </text:list-item>
        <text:list-item>
          <text:p text:style-name="P12">Guarda cambios</text:p>
        </text:list-item>
      </text:list>
      <text:h text:style-name="Heading_20_2" text:outline-level="2">12. 🔄 Flujo Completo</text:h>
      <text:list text:style-name="L12">
        <text:list-item>
          <text:p text:style-name="P13">API recibe request</text:p>
        </text:list-item>
        <text:list-item>
          <text:p text:style-name="P13">Pydantic valida</text:p>
        </text:list-item>
        <text:list-item>
          <text:p text:style-name="P13">Repository ejecuta</text:p>
        </text:list-item>
        <text:list-item>
          <text:p text:style-name="P13">ORM interactúa con BD</text:p>
        </text:list-item>
        <text:list-item>
          <text:p text:style-name="P13">Respuesta se retorna</text:p>
        </text:list-item>
      </text:list>
      <text:h text:style-name="Heading_20_2" text:outline-level="2">13. 🧪 Práctica: Agregar Nuevo Campo (<text:span text:style-name="Source_20_Text">stock</text:span>)</text:h>
      <text:h text:style-name="Heading_20_3" text:outline-level="3">Paso 1: Asegurar que existe en modelo y schema</text:h>
      <text:h text:style-name="Heading_20_3" text:outline-level="3">Paso 2: Crear producto con nuevo campo</text:h>
      <text:p text:style-name="Preformatted_20_Text"><text:span text:style-name="Source_20_Text">repo.create(ProductoCreate(</text:span></text:p>
      <text:p text:style-name="Preformatted_20_Text"><text:span text:style-name="Source_20_Text"><text:s text:c="4"/>nombre="Mouse",</text:span></text:p>
      <text:p text:style-name="Preformatted_20_Text"><text:span text:style-name="Source_20_Text"><text:s text:c="4"/>codigo="M001",</text:span></text:p>
      <text:p text:style-name="Preformatted_20_Text"><text:span text:style-name="Source_20_Text"><text:s text:c="4"/>precio=150,</text:span></text:p>
      <text:p text:style-name="Preformatted_20_Text"><text:span text:style-name="Source_20_Text"><text:s text:c="4"/>stock=10</text:span></text:p>
      <text:p text:style-name="P1"><text:span text:style-name="Source_20_Text">))</text:span></text:p>
      <text:h text:style-name="Heading_20_3" text:outline-level="3"><text:soft-page-break/>Paso 3: Actualizar campo</text:h>
      <text:p text:style-name="Preformatted_20_Text"><text:span text:style-name="Source_20_Text">producto = repo.get_by_id(1)</text:span></text:p>
      <text:p text:style-name="P1"><text:span text:style-name="Source_20_Text">repo.update(producto, ProductoUpdate(stock=20))</text:span></text:p>
      <text:h text:style-name="Heading_20_2" text:outline-level="2">14. ⚠️ Errores Comunes</text:h>
      <text:p text:style-name="Text_20_body">❌ No hacer commit<text:line-break/>❌ No usar refresh<text:line-break/>❌ No validar datos antes</text:p>
      <text:h text:style-name="Heading_20_2" text:outline-level="2">15. 🧠 Buenas Prácticas</text:h>
      <text:list text:style-name="L13">
        <text:list-item>
          <text:p text:style-name="P14">Mantener lógica de BD solo aquí</text:p>
        </text:list-item>
        <text:list-item>
          <text:p text:style-name="P14">No mezclar con lógica de negocio</text:p>
        </text:list-item>
        <text:list-item>
          <text:p text:style-name="P14">Usar transacciones correctamente</text:p>
        </text:list-item>
      </text:list>
      <text:h text:style-name="Heading_20_2" text:outline-level="2">16. 📌 Conclusión</text:h>
      <text:p text:style-name="Text_20_body">Este archivo es clave para:</text:p>
      <text:list text:style-name="L14">
        <text:list-item>
          <text:p text:style-name="P15">CRUD completo</text:p>
        </text:list-item>
        <text:list-item>
          <text:p text:style-name="P15">Escalabilidad</text:p>
        </text:list-item>
        <text:list-item>
          <text:p text:style-name="P15">Buen diseño backend</text:p>
        </text:list-item>
      </text:list>
      <text:p text:style-name="Text_20_body">👉 Dominar Repository Pattern = nivel backend profesiona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7:11:25.999932565</meta:creation-date>
    <dc:date>2026-04-23T17:12:30.057099285</dc:date>
    <meta:editing-duration>PT1M4S</meta:editing-duration>
    <meta:editing-cycles>1</meta:editing-cycles>
    <meta:document-statistic meta:table-count="0" meta:image-count="0" meta:object-count="0" meta:page-count="4" meta:paragraph-count="93" meta:word-count="436" meta:character-count="2970" meta:non-whitespace-character-count="2629"/>
    <meta:generator>LibreOffice/24.2.7.2$Linux_X86_64 LibreOffice_project/420$Build-2</meta:generator>
  </office:meta>
</office:document-meta>
</file>