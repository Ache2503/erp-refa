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/>
    <style:style style:name="P11" style:family="paragraph" style:parent-style-name="Text_20_body" style:list-style-name="L10"/>
    <style:style style:name="P12" style:family="paragraph" style:parent-style-name="Text_20_body" style:list-style-name="L11"/>
    <style:style style:name="P13" style:family="paragraph" style:parent-style-name="Text_20_body" style:list-style-name="L12"/>
    <style:style style:name="P14" style:family="paragraph" style:parent-style-name="Text_20_body" style:list-style-name="L13"/>
    <style:style style:name="P15" style:family="paragraph" style:parent-style-name="Text_20_body" style:list-style-name="L14"/>
    <style:style style:name="P16" style:family="paragraph" style:parent-style-name="Text_20_body" style:list-style-name="L15"/>
    <style:style style:name="P17" style:family="paragraph" style:parent-style-name="Text_20_body" style:list-style-name="L16"/>
    <style:style style:name="P18" style:family="paragraph" style:parent-style-name="Text_20_body" style:list-style-name="L17"/>
    <style:style style:name="P19" style:family="paragraph" style:parent-style-name="Text_20_body" style:list-style-name="L18"/>
    <style:style style:name="P20" style:family="paragraph" style:parent-style-name="Text_20_body" style:list-style-name="L19"/>
    <style:style style:name="P21" style:family="paragraph" style:parent-style-name="Text_20_body" style:list-style-name="L20"/>
    <style:style style:name="P22" style:family="paragraph" style:parent-style-name="Text_20_body" style:list-style-name="L21"/>
    <style:style style:name="P23" style:family="paragraph" style:parent-style-name="Text_20_body" style:list-style-name="L22"/>
    <style:style style:name="P24" style:family="paragraph" style:parent-style-name="Text_20_body" style:list-style-name="L23"/>
    <style:style style:name="P25" style:family="paragraph" style:parent-style-name="Text_20_body" style:list-style-name="L24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📘 Manual Técnico: Modelo <text:span text:style-name="Source_20_Text">Productos</text:span> en SQLAlchemy</text:h>
      <text:h text:style-name="Heading_20_2" text:outline-level="2">1. 📌 Descripción General</text:h>
      <text:p text:style-name="Text_20_body">Este archivo define un modelo ORM (Object Relational Mapping) llamado <text:span text:style-name="Source_20_Text">Productos</text:span> utilizando SQLAlchemy. Su propósito es representar la tabla <text:span text:style-name="Source_20_Text">productos</text:span> dentro de una base de datos relacional.</text:p>
      <text:p text:style-name="Text_20_body">Permite:</text:p>
      <text:list text:style-name="L1">
        <text:list-item>
          <text:p text:style-name="P2">Crear, leer, actualizar y eliminar productos.</text:p>
        </text:list-item>
        <text:list-item>
          <text:p text:style-name="P2">Relacionar productos con otras entidades como categorías, marcas, almacenes, pedidos, etc.</text:p>
        </text:list-item>
        <text:list-item>
          <text:p text:style-name="P2">Validar reglas de negocio directamente desde la base de datos.</text:p>
        </text:list-item>
      </text:list>
      <text:h text:style-name="Heading_20_2" text:outline-level="2">2. ⚙️ Importaciones</text:h>
      <text:p text:style-name="Preformatted_20_Text"><text:span text:style-name="Source_20_Text">import decimal</text:span></text:p>
      <text:p text:style-name="Preformatted_20_Text"><text:span text:style-name="Source_20_Text">from typing import Optional</text:span></text:p>
      <text:p text:style-name="Preformatted_20_Text"><text:span text:style-name="Source_20_Text">from sqlalchemy import CheckConstraint, Column, ForeignKeyConstraint, Index, Integer, String, Float, Date, DateTime, Text, Boolean, DECIMAL, ForeignKey, UniqueConstraint, text</text:span></text:p>
      <text:p text:style-name="Preformatted_20_Text"><text:span text:style-name="Source_20_Text">from sqlalchemy.orm import relationship, Mapped, mapped_column</text:span></text:p>
      <text:p text:style-name="P1"><text:span text:style-name="Source_20_Text">from app.core.database import Base</text:span></text:p>
      <text:h text:style-name="Heading_20_3" text:outline-level="3">Explicación:</text:h>
      <text:list text:style-name="L2">
        <text:list-item>
          <text:p text:style-name="P3"><text:span text:style-name="Source_20_Text">decimal</text:span>: Permite manejar valores monetarios con precisión.</text:p>
        </text:list-item>
        <text:list-item>
          <text:p text:style-name="P3"><text:span text:style-name="Source_20_Text">Optional</text:span>: Indica campos opcionales.</text:p>
        </text:list-item>
        <text:list-item>
          <text:p text:style-name="P3"><text:span text:style-name="Source_20_Text">sqlalchemy</text:span>: Librería principal para ORM.</text:p>
        </text:list-item>
        <text:list-item>
          <text:p text:style-name="P3"><text:span text:style-name="Source_20_Text">relationship</text:span>: Define relaciones entre tablas.</text:p>
        </text:list-item>
        <text:list-item>
          <text:p text:style-name="P3"><text:span text:style-name="Source_20_Text">Mapped</text:span>: Tipado moderno en SQLAlchemy.</text:p>
        </text:list-item>
        <text:list-item>
          <text:p text:style-name="P3"><text:span text:style-name="Source_20_Text">Base</text:span>: Clase base para todos los modelos.</text:p>
        </text:list-item>
      </text:list>
      <text:h text:style-name="Heading_20_2" text:outline-level="2">3. 🧱 Definición de la Clase</text:h>
      <text:p text:style-name="P1"><text:span text:style-name="Source_20_Text">class Productos(Base):</text:span></text:p>
      <text:list text:style-name="L3">
        <text:list-item>
          <text:p text:style-name="P4">Hereda de <text:span text:style-name="Source_20_Text">Base</text:span>, lo que la convierte en una tabla del ORM.</text:p>
        </text:list-item>
      </text:list>
      <text:h text:style-name="Heading_20_2" text:outline-level="2"><text:soft-page-break/>4. 🗂️ Nombre de la Tabla</text:h>
      <text:p text:style-name="P1"><text:span text:style-name="Source_20_Text">__tablename__ = 'productos'</text:span></text:p>
      <text:list text:style-name="L4">
        <text:list-item>
          <text:p text:style-name="P5">Define el nombre de la tabla en la base de datos.</text:p>
        </text:list-item>
      </text:list>
      <text:h text:style-name="Heading_20_2" text:outline-level="2">5. 🛡️ Restricciones e Índices</text:h>
      <text:p text:style-name="Preformatted_20_Text"><text:span text:style-name="Source_20_Text">__table_args__ = (</text:span></text:p>
      <text:p text:style-name="P1"><text:span text:style-name="Source_20_Text"><text:s text:c="4"/>CheckConstraint('(`precio` &gt;= 0)', name='productos_chk_1'),</text:span></text:p>
      <text:list text:style-name="L5">
        <text:list-item>
          <text:p text:style-name="P6">Evita precios negativos.</text:p>
        </text:list-item>
      </text:list>
      <text:p text:style-name="P1"><text:span text:style-name="Source_20_Text"><text:s text:c="4"/>ForeignKeyConstraint(['id_categoria'], ['categorias.id_categoria']),</text:span></text:p>
      <text:list text:style-name="L6">
        <text:list-item>
          <text:p text:style-name="P7">Relación con la tabla <text:span text:style-name="Source_20_Text">categorias</text:span>.</text:p>
        </text:list-item>
      </text:list>
      <text:p text:style-name="P1"><text:span text:style-name="Source_20_Text"><text:s text:c="4"/>Index('codigo', 'codigo', unique=True),</text:span></text:p>
      <text:list text:style-name="L7">
        <text:list-item>
          <text:p text:style-name="P8">El campo <text:span text:style-name="Source_20_Text">codigo</text:span> es único.</text:p>
        </text:list-item>
      </text:list>
      <text:h text:style-name="Heading_20_3" text:outline-level="3">Índices adicionales:</text:h>
      <text:list text:style-name="L8">
        <text:list-item>
          <text:p text:style-name="P9"><text:span text:style-name="Source_20_Text">idx_producto_categoria</text:span></text:p>
        </text:list-item>
        <text:list-item>
          <text:p text:style-name="P9"><text:span text:style-name="Source_20_Text">idx_producto_marca</text:span></text:p>
        </text:list-item>
        <text:list-item>
          <text:p text:style-name="P9"><text:span text:style-name="Source_20_Text">idx_producto_um</text:span></text:p>
        </text:list-item>
      </text:list>
      <text:p text:style-name="Text_20_body">👉 Mejoran el rendimiento en búsquedas.</text:p>
      <text:h text:style-name="Heading_20_2" text:outline-level="2">6. 📊 Columnas de la Tabla</text:h>
      <text:p text:style-name="P1"><text:span text:style-name="Source_20_Text">id_producto = mapped_column(Integer, primary_key=True)</text:span></text:p>
      <text:list text:style-name="L9">
        <text:list-item>
          <text:p text:style-name="P10">Identificador único del producto.</text:p>
        </text:list-item>
      </text:list>
      <text:p text:style-name="P1"><text:span text:style-name="Source_20_Text">nombre = mapped_column(String(100), nullable=False)</text:span></text:p>
      <text:list text:style-name="L10">
        <text:list-item>
          <text:p text:style-name="P11">Nombre del producto.</text:p>
        </text:list-item>
      </text:list>
      <text:p text:style-name="P1"><text:span text:style-name="Source_20_Text">codigo = mapped_column(String(50), nullable=False)</text:span></text:p>
      <text:list text:style-name="L11">
        <text:list-item>
          <text:p text:style-name="P12">Código único del producto.</text:p>
        </text:list-item>
      </text:list>
      <text:p text:style-name="P1"><text:span text:style-name="Source_20_Text">id_categoria = mapped_column(Integer, nullable=False)</text:span></text:p>
      <text:list text:style-name="L12">
        <text:list-item>
          <text:p text:style-name="P13">Llave foránea a categorías.</text:p>
        </text:list-item>
      </text:list>
      <text:p text:style-name="P1"><text:span text:style-name="Source_20_Text">id_marca = mapped_column(Integer, nullable=False)</text:span></text:p>
      <text:list text:style-name="L13">
        <text:list-item>
          <text:p text:style-name="P14">Llave foránea a marcas.</text:p>
        </text:list-item>
      </text:list>
      <text:p text:style-name="P1"><text:soft-page-break/><text:span text:style-name="Source_20_Text">id_unidad_medida = mapped_column(Integer, nullable=False)</text:span></text:p>
      <text:list text:style-name="L14">
        <text:list-item>
          <text:p text:style-name="P15">Llave foránea a unidades de medida.</text:p>
        </text:list-item>
      </text:list>
      <text:p text:style-name="P1"><text:span text:style-name="Source_20_Text">precio = mapped_column(DECIMAL(10, 2), nullable=False)</text:span></text:p>
      <text:list text:style-name="L15">
        <text:list-item>
          <text:p text:style-name="P16">Precio del producto con 2 decimales.</text:p>
        </text:list-item>
      </text:list>
      <text:p text:style-name="P1"><text:span text:style-name="Source_20_Text">estatus = mapped_column(String(20), nullable=False, server_default=text("'activo'"))</text:span></text:p>
      <text:list text:style-name="L16">
        <text:list-item>
          <text:p text:style-name="P17">Estado del producto (activo por defecto).</text:p>
        </text:list-item>
      </text:list>
      <text:p text:style-name="P1"><text:span text:style-name="Source_20_Text">descripcion = mapped_column(Text)</text:span></text:p>
      <text:list text:style-name="L17">
        <text:list-item>
          <text:p text:style-name="P18">Campo opcional para descripción.</text:p>
        </text:list-item>
      </text:list>
      <text:h text:style-name="Heading_20_2" text:outline-level="2">7. 🔗 Relaciones</text:h>
      <text:p text:style-name="Text_20_body">Ejemplo:</text:p>
      <text:p text:style-name="P1"><text:span text:style-name="Source_20_Text">categorias = relationship('Categorias', back_populates='productos')</text:span></text:p>
      <text:h text:style-name="Heading_20_3" text:outline-level="3">¿Qué significa?</text:h>
      <text:list text:style-name="L18">
        <text:list-item>
          <text:p text:style-name="P19">Un producto pertenece a una categoría.</text:p>
        </text:list-item>
        <text:list-item>
          <text:p text:style-name="P19">Permite acceder a <text:span text:style-name="Source_20_Text">producto.categorias</text:span>.</text:p>
        </text:list-item>
      </text:list>
      <text:h text:style-name="Heading_20_3" text:outline-level="3">Relaciones principales:</text:h>
      <text:list text:style-name="L19">
        <text:list-item>
          <text:p text:style-name="P20">Categorías</text:p>
        </text:list-item>
        <text:list-item>
          <text:p text:style-name="P20">Marcas</text:p>
        </text:list-item>
        <text:list-item>
          <text:p text:style-name="P20">Unidades de medida</text:p>
        </text:list-item>
        <text:list-item>
          <text:p text:style-name="P20">Compras</text:p>
        </text:list-item>
        <text:list-item>
          <text:p text:style-name="P20">Movimientos</text:p>
        </text:list-item>
        <text:list-item>
          <text:p text:style-name="P20">Pedidos cliente/proveedor</text:p>
        </text:list-item>
        <text:list-item>
          <text:p text:style-name="P20">Almacenes</text:p>
        </text:list-item>
        <text:list-item>
          <text:p text:style-name="P20">Traslados</text:p>
        </text:list-item>
        <text:list-item>
          <text:p text:style-name="P20">Devoluciones</text:p>
        </text:list-item>
        <text:list-item>
          <text:p text:style-name="P20">Envíos</text:p>
        </text:list-item>
      </text:list>
      <text:p text:style-name="Text_20_body">👉 Estas relaciones permiten consultas complejas sin escribir SQL manual.</text:p>
      <text:h text:style-name="Heading_20_2" text:outline-level="2"><text:soft-page-break/>8. 🔄 ¿Cómo Funciona?</text:h>
      <text:p text:style-name="Text_20_body">Cuando creas un objeto:</text:p>
      <text:p text:style-name="P1"><text:span text:style-name="Source_20_Text">nuevo = Productos(nombre="Mouse", codigo="M001", ...)</text:span></text:p>
      <text:p text:style-name="Text_20_body">SQLAlchemy:</text:p>
      <text:list text:style-name="L20">
        <text:list-item>
          <text:p text:style-name="P21">Traduce el objeto a SQL.</text:p>
        </text:list-item>
        <text:list-item>
          <text:p text:style-name="P21">Inserta en la tabla.</text:p>
        </text:list-item>
        <text:list-item>
          <text:p text:style-name="P21">Gestiona relaciones automáticamente.</text:p>
        </text:list-item>
      </text:list>
      <text:h text:style-name="Heading_20_2" text:outline-level="2">9. ➕ Cómo Agregar una Nueva Columna</text:h>
      <text:h text:style-name="Heading_20_3" text:outline-level="3">Paso 1: Agregar en el modelo</text:h>
      <text:p text:style-name="P1"><text:span text:style-name="Source_20_Text">stock = mapped_column(Integer, nullable=False, default=0)</text:span></text:p>
      <text:h text:style-name="Heading_20_3" text:outline-level="3">Paso 2: Migración (si usas Alembic)</text:h>
      <text:p text:style-name="Preformatted_20_Text"><text:span text:style-name="Source_20_Text">alembic revision --autogenerate -m "Agregar columna stock"</text:span></text:p>
      <text:p text:style-name="P1"><text:span text:style-name="Source_20_Text">alembic upgrade head</text:span></text:p>
      <text:h text:style-name="Heading_20_3" text:outline-level="3">Paso 3: Verificar</text:h>
      <text:list text:style-name="L21">
        <text:list-item>
          <text:p text:style-name="P22">Revisar base de datos.</text:p>
        </text:list-item>
        <text:list-item>
          <text:p text:style-name="P22">Probar inserciones.</text:p>
        </text:list-item>
      </text:list>
      <text:h text:style-name="Heading_20_2" text:outline-level="2">10. ⚠️ Buenas Prácticas</text:h>
      <text:list text:style-name="L22">
        <text:list-item>
          <text:p text:style-name="P23">Usar <text:span text:style-name="Source_20_Text">DECIMAL</text:span> para dinero (no FLOAT).</text:p>
        </text:list-item>
        <text:list-item>
          <text:p text:style-name="P23">Definir índices en campos de búsqueda frecuente.</text:p>
        </text:list-item>
        <text:list-item>
          <text:p text:style-name="P23">Usar <text:span text:style-name="Source_20_Text">nullable=False</text:span> cuando sea obligatorio.</text:p>
        </text:list-item>
        <text:list-item>
          <text:p text:style-name="P23">Mantener nombres claros.</text:p>
        </text:list-item>
      </text:list>
      <text:h text:style-name="Heading_20_2" text:outline-level="2">11. 🧠 Recomendaciones para Nuevos Programadores</text:h>
      <text:list text:style-name="L23">
        <text:list-item>
          <text:p text:style-name="P24">Entender ORM antes de escribir consultas complejas.</text:p>
        </text:list-item>
        <text:list-item>
          <text:p text:style-name="P24">Practicar relaciones (1:N, N:M).</text:p>
        </text:list-item>
        <text:list-item>
          <text:p text:style-name="P24">Leer errores de SQLAlchemy cuidadosamente.</text:p>
        </text:list-item>
        <text:list-item>
          <text:p text:style-name="P24">Probar cada cambio en entorno de desarrollo.</text:p>
        </text:list-item>
      </text:list>
      <text:h text:style-name="Heading_20_2" text:outline-level="2"><text:soft-page-break/>12. 📌 Conclusión</text:h>
      <text:p text:style-name="Text_20_body">Este modelo es el núcleo del sistema de inventario, ya que conecta productos con todas las operaciones del negocio.</text:p>
      <text:p text:style-name="Text_20_body">Dominar este archivo te permitirá:</text:p>
      <text:list text:style-name="L24">
        <text:list-item>
          <text:p text:style-name="P25">Escalar el sistema.</text:p>
        </text:list-item>
        <text:list-item>
          <text:p text:style-name="P25">Optimizar consultas.</text:p>
        </text:list-item>
        <text:list-item>
          <text:p text:style-name="P25">Mantener integridad de datos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DejaVu Sans" fo:font-size="12pt" fo:language="es" fo:country="MX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DejaVu Sans" fo:font-size="12pt" fo:language="es" fo:country="MX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ans" fo:font-family="'DejaVu Sans'" style:font-family-generic="swiss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DejaVu Sans" fo:font-family="'DejaVu Sans'" style:font-family-generic="swiss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DejaVu Sans" fo:font-family="'DejaVu Sans'" style:font-family-generic="swiss"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ejaVu Sans" fo:font-family="'DejaVu Sans'" style:font-family-generic="swiss"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23T16:59:05.454481956</meta:creation-date>
    <dc:date>2026-04-23T19:41:35.993774400</dc:date>
    <meta:editing-duration>PT1H10M1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5" meta:paragraph-count="108" meta:word-count="561" meta:character-count="4016" meta:non-whitespace-character-count="3606"/>
  </office:meta>
</office:document-meta>
</file>