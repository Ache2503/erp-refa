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Manual Técnico: Service de Productos (<text:span text:style-name="Source_20_Text">producto_service.py</text:span>)</text:h>
      <text:h text:style-name="Heading_20_2" text:outline-level="2">1. 📌 Descripción General</text:h>
      <text:p text:style-name="Text_20_body">Este archivo implementa la <text:span text:style-name="Strong_20_Emphasis">capa de servicio (Service Layer)</text:span> para productos.</text:p>
      <text:p text:style-name="Text_20_body">👉 Aquí vive la <text:span text:style-name="Strong_20_Emphasis">lógica de negocio</text:span>:</text:p>
      <text:list text:style-name="L1">
        <text:list-item>
          <text:p text:style-name="P2">Validaciones adicionales</text:p>
        </text:list-item>
        <text:list-item>
          <text:p text:style-name="P2">Reglas (ej. código único)</text:p>
        </text:list-item>
        <text:list-item>
          <text:p text:style-name="P2">Manejo de errores HTTP</text:p>
        </text:list-item>
      </text:list>
      <text:p text:style-name="Text_20_body">Se apoya en el Repository para acceder a la base de datos.</text:p>
      <text:h text:style-name="Heading_20_2" text:outline-level="2">2. 🧠 ¿Qué hace un Service?</text:h>
      <text:list text:style-name="L2">
        <text:list-item>
          <text:p text:style-name="P3">Orquesta el flujo de la aplicación</text:p>
        </text:list-item>
        <text:list-item>
          <text:p text:style-name="P3">Decide qué hacer con los datos</text:p>
        </text:list-item>
        <text:list-item>
          <text:p text:style-name="P3">Lanza errores controlados (HTTP)</text:p>
        </text:list-item>
      </text:list>
      <text:p text:style-name="Text_20_body">👉 No accede directamente a la BD (usa Repository)</text:p>
      <text:h text:style-name="Heading_20_2" text:outline-level="2">3. ⚙️ Importaciones</text:h>
      <text:p text:style-name="Preformatted_20_Text"><text:span text:style-name="Source_20_Text">from sqlalchemy.orm import Session</text:span></text:p>
      <text:p text:style-name="Preformatted_20_Text"><text:span text:style-name="Source_20_Text">from fastapi import HTTPException, status</text:span></text:p>
      <text:p text:style-name="Preformatted_20_Text"><text:span text:style-name="Source_20_Text">from typing import List</text:span></text:p>
      <text:p text:style-name="Preformatted_20_Text"/>
      <text:p text:style-name="Preformatted_20_Text"><text:span text:style-name="Source_20_Text">from app.repositories.producto_repository import ProductoRepository</text:span></text:p>
      <text:p text:style-name="P1"><text:span text:style-name="Source_20_Text">from app.schemas.producto import ProductoCreate, ProductoUpdate, ProductoResponse</text:span></text:p>
      <text:h text:style-name="Heading_20_3" text:outline-level="3">Explicación:</text:h>
      <text:list text:style-name="L3">
        <text:list-item>
          <text:p text:style-name="P4"><text:span text:style-name="Source_20_Text">HTTPException</text:span>: errores controlados</text:p>
        </text:list-item>
        <text:list-item>
          <text:p text:style-name="P4"><text:span text:style-name="Source_20_Text">status</text:span>: códigos HTTP</text:p>
        </text:list-item>
        <text:list-item>
          <text:p text:style-name="P4"><text:span text:style-name="Source_20_Text">Repository</text:span>: acceso a datos</text:p>
        </text:list-item>
        <text:list-item>
          <text:p text:style-name="P4"><text:span text:style-name="Source_20_Text">Schemas</text:span>: validación y respuesta</text:p>
        </text:list-item>
      </text:list>
      <text:h text:style-name="Heading_20_2" text:outline-level="2">4. 🧱 Clase Principal</text:h>
      <text:p text:style-name="P1"><text:span text:style-name="Source_20_Text">class ProductoService:</text:span></text:p>
      <text:p text:style-name="Text_20_body"><text:soft-page-break/>👉 Contiene toda la lógica del módulo productos</text:p>
      <text:h text:style-name="Heading_20_2" text:outline-level="2">5. 🔌 Constructor</text:h>
      <text:p text:style-name="Preformatted_20_Text"><text:span text:style-name="Source_20_Text">def __init__(self, db: Session):</text:span></text:p>
      <text:p text:style-name="P1"><text:span text:style-name="Source_20_Text"><text:s text:c="4"/>self.repo = ProductoRepository(db)</text:span></text:p>
      <text:list text:style-name="L4">
        <text:list-item>
          <text:p text:style-name="P5">Inicializa el repository</text:p>
        </text:list-item>
        <text:list-item>
          <text:p text:style-name="P5">Conecta Service con BD indirectamente</text:p>
        </text:list-item>
      </text:list>
      <text:h text:style-name="Heading_20_2" text:outline-level="2">6. 📋 Listar Productos</text:h>
      <text:p text:style-name="P1"><text:span text:style-name="Source_20_Text">def listar_productos(self, skip: int = 0, limit: int = 100) -&gt; List[ProductoResponse]:</text:span></text:p>
      <text:h text:style-name="Heading_20_3" text:outline-level="3">Flujo:</text:h>
      <text:list text:style-name="L5">
        <text:list-item>
          <text:p text:style-name="P6">Obtiene datos del repository</text:p>
        </text:list-item>
        <text:list-item>
          <text:p text:style-name="P6">Convierte a formato Pydantic</text:p>
        </text:list-item>
      </text:list>
      <text:p text:style-name="P1"><text:span text:style-name="Source_20_Text">return [ProductoResponse.model_validate(p) for p in productos]</text:span></text:p>
      <text:p text:style-name="Text_20_body">👉 Convierte ORM → JSON válido</text:p>
      <text:h text:style-name="Heading_20_2" text:outline-level="2">7. 🔍 Obtener Producto por ID</text:h>
      <text:p text:style-name="P1"><text:span text:style-name="Source_20_Text">def obtener_producto(self, producto_id: int) -&gt; ProductoResponse:</text:span></text:p>
      <text:h text:style-name="Heading_20_3" text:outline-level="3">Validación:</text:h>
      <text:p text:style-name="Preformatted_20_Text"><text:span text:style-name="Source_20_Text">if not producto:</text:span></text:p>
      <text:p text:style-name="P1"><text:span text:style-name="Source_20_Text"><text:s text:c="4"/>raise HTTPException(status_code=404)</text:span></text:p>
      <text:p text:style-name="Text_20_body">👉 Si no existe, lanza error</text:p>
      <text:h text:style-name="Heading_20_2" text:outline-level="2">8. ➕ Crear Producto</text:h>
      <text:p text:style-name="P1"><text:span text:style-name="Source_20_Text">def crear_producto(self, data: ProductoCreate) -&gt; ProductoResponse:</text:span></text:p>
      <text:h text:style-name="Heading_20_3" text:outline-level="3">Regla de negocio:</text:h>
      <text:p text:style-name="P1"><text:span text:style-name="Source_20_Text">if self.repo.get_by_codigo(data.codigo):</text:span></text:p>
      <text:p text:style-name="Text_20_body">👉 Evita duplicados</text:p>
      <text:h text:style-name="Heading_20_3" text:outline-level="3">Error:</text:h>
      <text:p text:style-name="P1"><text:span text:style-name="Source_20_Text">status.HTTP_409_CONFLICT</text:span></text:p>
      <text:h text:style-name="Heading_20_2" text:outline-level="2"><text:soft-page-break/>9. 🔄 Actualizar Producto</text:h>
      <text:p text:style-name="P1"><text:span text:style-name="Source_20_Text">def actualizar_producto(self, producto_id: int, data: ProductoUpdate)</text:span></text:p>
      <text:h text:style-name="Heading_20_3" text:outline-level="3">Flujo:</text:h>
      <text:list text:style-name="L6">
        <text:list-item>
          <text:p text:style-name="P7">Verifica existencia</text:p>
        </text:list-item>
        <text:list-item>
          <text:p text:style-name="P7">Valida código único</text:p>
        </text:list-item>
        <text:list-item>
          <text:p text:style-name="P7">Actualiza</text:p>
        </text:list-item>
      </text:list>
      <text:p text:style-name="P1"><text:span text:style-name="Source_20_Text">if data.codigo and data.codigo != producto_actual.codigo:</text:span></text:p>
      <text:p text:style-name="Text_20_body">👉 Solo valida si cambia el código</text:p>
      <text:h text:style-name="Heading_20_2" text:outline-level="2">10. ❌ Eliminar Producto</text:h>
      <text:p text:style-name="P1"><text:span text:style-name="Source_20_Text">def eliminar_producto(self, producto_id: int) -&gt; None:</text:span></text:p>
      <text:h text:style-name="Heading_20_3" text:outline-level="3">Validación:</text:h>
      <text:list text:style-name="L7">
        <text:list-item>
          <text:p text:style-name="P8">Si no existe → error 404</text:p>
        </text:list-item>
      </text:list>
      <text:h text:style-name="Heading_20_2" text:outline-level="2">11. 🔄 Flujo Completo del Sistema</text:h>
      <text:list text:style-name="L8">
        <text:list-item>
          <text:p text:style-name="P9">Cliente (Frontend/Postman)</text:p>
        </text:list-item>
        <text:list-item>
          <text:p text:style-name="P9">Endpoint (FastAPI)</text:p>
        </text:list-item>
        <text:list-item>
          <text:p text:style-name="P9">Service (lógica)</text:p>
        </text:list-item>
        <text:list-item>
          <text:p text:style-name="P9">Repository (BD)</text:p>
        </text:list-item>
        <text:list-item>
          <text:p text:style-name="P9">Base de datos</text:p>
        </text:list-item>
        <text:list-item>
          <text:p text:style-name="P9">Respuesta</text:p>
        </text:list-item>
      </text:list>
      <text:h text:style-name="Heading_20_2" text:outline-level="2">12. 🧪 Práctica: Agregar Campo (<text:span text:style-name="Source_20_Text">stock</text:span>)</text:h>
      <text:h text:style-name="Heading_20_3" text:outline-level="3">Paso 1: Crear producto</text:h>
      <text:p text:style-name="Preformatted_20_Text"><text:span text:style-name="Source_20_Text">service.crear_producto(ProductoCreate(</text:span></text:p>
      <text:p text:style-name="Preformatted_20_Text"><text:span text:style-name="Source_20_Text"><text:s text:c="4"/>nombre="Mouse",</text:span></text:p>
      <text:p text:style-name="Preformatted_20_Text"><text:span text:style-name="Source_20_Text"><text:s text:c="4"/>codigo="M001",</text:span></text:p>
      <text:p text:style-name="Preformatted_20_Text"><text:span text:style-name="Source_20_Text"><text:s text:c="4"/>precio=150,</text:span></text:p>
      <text:p text:style-name="Preformatted_20_Text"><text:span text:style-name="Source_20_Text"><text:s text:c="4"/>stock=10</text:span></text:p>
      <text:p text:style-name="P1"><text:span text:style-name="Source_20_Text">))</text:span></text:p>
      <text:h text:style-name="Heading_20_3" text:outline-level="3"><text:soft-page-break/>Paso 2: Validar lógica</text:h>
      <text:p text:style-name="Text_20_body">Ejemplo: evitar stock negativo</text:p>
      <text:p text:style-name="Preformatted_20_Text"><text:span text:style-name="Source_20_Text">if data.stock is not None and data.stock &lt; 0:</text:span></text:p>
      <text:p text:style-name="Preformatted_20_Text"><text:span text:style-name="Source_20_Text"><text:s text:c="4"/>raise HTTPException(</text:span></text:p>
      <text:p text:style-name="Preformatted_20_Text"><text:span text:style-name="Source_20_Text"><text:s text:c="8"/>status_code=400,</text:span></text:p>
      <text:p text:style-name="Preformatted_20_Text"><text:span text:style-name="Source_20_Text"><text:s text:c="8"/>detail="El stock no puede ser negativo"</text:span></text:p>
      <text:p text:style-name="P1"><text:span text:style-name="Source_20_Text"><text:s text:c="4"/>)</text:span></text:p>
      <text:p text:style-name="Text_20_body">👉 Esto se agrega en <text:span text:style-name="Source_20_Text">actualizar_producto</text:span></text:p>
      <text:h text:style-name="Heading_20_2" text:outline-level="2">13. ⚠️ Errores Comunes</text:h>
      <text:p text:style-name="Text_20_body">❌ No validar existencia antes de actualizar<text:line-break/>❌ No controlar duplicados<text:line-break/>❌ Mezclar lógica de BD aquí</text:p>
      <text:h text:style-name="Heading_20_2" text:outline-level="2">14. 🧠 Buenas Prácticas</text:h>
      <text:list text:style-name="L9">
        <text:list-item>
          <text:p text:style-name="P10">Toda validación va aquí</text:p>
        </text:list-item>
        <text:list-item>
          <text:p text:style-name="P10">Repository solo hace consultas</text:p>
        </text:list-item>
        <text:list-item>
          <text:p text:style-name="P10">Usar errores HTTP claros</text:p>
        </text:list-item>
      </text:list>
      <text:h text:style-name="Heading_20_2" text:outline-level="2">15. 🚀 Ejercicio</text:h>
      <text:p text:style-name="Text_20_body">Agrega estas reglas:</text:p>
      <text:list text:style-name="L10">
        <text:list-item>
          <text:p text:style-name="P11">Precio máximo = 10,000</text:p>
        </text:list-item>
        <text:list-item>
          <text:p text:style-name="P11">Estatus solo puede ser "activo" o "inactivo"</text:p>
        </text:list-item>
      </text:list>
      <text:h text:style-name="Heading_20_2" text:outline-level="2">16. 📌 Conclusión</text:h>
      <text:p text:style-name="Text_20_body">Este archivo es el cerebro del backend.</text:p>
      <text:p text:style-name="Text_20_body">👉 Aquí decides cómo funciona tu sistema.</text:p>
      <text:p text:style-name="Text_20_body">Dominar Service Layer = backend profesional real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7:12:31.615965908</meta:creation-date>
    <dc:date>2026-04-23T17:14:40.867938011</dc:date>
    <meta:editing-duration>PT2M9S</meta:editing-duration>
    <meta:editing-cycles>1</meta:editing-cycles>
    <meta:document-statistic meta:table-count="0" meta:image-count="0" meta:object-count="0" meta:page-count="4" meta:paragraph-count="101" meta:word-count="457" meta:character-count="3130" meta:non-whitespace-character-count="2755"/>
    <meta:generator>LibreOffice/24.2.7.2$Linux_X86_64 LibreOffice_project/420$Build-2</meta:generator>
  </office:meta>
</office:document-meta>
</file>