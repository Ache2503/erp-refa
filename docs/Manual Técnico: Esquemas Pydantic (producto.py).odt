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Manual Técnico: Esquemas Pydantic (<text:span text:style-name="Source_20_Text">producto.py</text:span>)</text:h>
      <text:h text:style-name="Heading_20_2" text:outline-level="2">1. 📌 Descripción General</text:h>
      <text:p text:style-name="Text_20_body">Este archivo define los <text:span text:style-name="Strong_20_Emphasis">esquemas de validación</text:span> usando Pydantic para el manejo de productos.</text:p>
      <text:p text:style-name="Text_20_body">Su función principal es:</text:p>
      <text:list text:style-name="L1">
        <text:list-item>
          <text:p text:style-name="P2">Validar datos que entran desde el cliente (API)</text:p>
        </text:list-item>
        <text:list-item>
          <text:p text:style-name="P2">Estandarizar respuestas</text:p>
        </text:list-item>
        <text:list-item>
          <text:p text:style-name="P2">Evitar errores antes de llegar a la base de datos</text:p>
        </text:list-item>
      </text:list>
      <text:p text:style-name="Text_20_body">👉 Es la capa entre el frontend y el backend.</text:p>
      <text:h text:style-name="Heading_20_2" text:outline-level="2">2. ⚙️ Importaciones</text:h>
      <text:p text:style-name="Preformatted_20_Text"><text:span text:style-name="Source_20_Text">from pydantic import BaseModel, Field, ConfigDict</text:span></text:p>
      <text:p text:style-name="Preformatted_20_Text"><text:span text:style-name="Source_20_Text">from decimal import Decimal</text:span></text:p>
      <text:p text:style-name="P1"><text:span text:style-name="Source_20_Text">from typing import Optional</text:span></text:p>
      <text:h text:style-name="Heading_20_3" text:outline-level="3">Explicación:</text:h>
      <text:list text:style-name="L2">
        <text:list-item>
          <text:p text:style-name="P3"><text:span text:style-name="Source_20_Text">BaseModel</text:span>: base para crear esquemas</text:p>
        </text:list-item>
        <text:list-item>
          <text:p text:style-name="P3"><text:span text:style-name="Source_20_Text">Field</text:span>: permite validaciones</text:p>
        </text:list-item>
        <text:list-item>
          <text:p text:style-name="P3"><text:span text:style-name="Source_20_Text">Decimal</text:span>: precisión en valores monetarios</text:p>
        </text:list-item>
        <text:list-item>
          <text:p text:style-name="P3"><text:span text:style-name="Source_20_Text">Optional</text:span>: campos opcionales</text:p>
        </text:list-item>
      </text:list>
      <text:h text:style-name="Heading_20_2" text:outline-level="2">3. 🧱 Clase: ProductoBase</text:h>
      <text:p text:style-name="P1"><text:span text:style-name="Source_20_Text">class ProductoBase(BaseModel):</text:span></text:p>
      <text:p text:style-name="Text_20_body">Contiene los campos principales del producto.</text:p>
      <text:h text:style-name="Heading_20_3" text:outline-level="3">Campos:</text:h>
      <text:p text:style-name="P1"><text:span text:style-name="Source_20_Text">nombre: str = Field(..., min_length=1, max_length=100)</text:span></text:p>
      <text:list text:style-name="L3">
        <text:list-item>
          <text:p text:style-name="P4">Obligatorio</text:p>
        </text:list-item>
        <text:list-item>
          <text:p text:style-name="P4">Longitud entre 1 y 100</text:p>
        </text:list-item>
      </text:list>
      <text:p text:style-name="P1"><text:span text:style-name="Source_20_Text">descripcion: Optional[str] = None</text:span></text:p>
      <text:list text:style-name="L4">
        <text:list-item>
          <text:p text:style-name="P5"><text:soft-page-break/>Campo opcional</text:p>
        </text:list-item>
      </text:list>
      <text:p text:style-name="P1"><text:span text:style-name="Source_20_Text">codigo: str = Field(..., min_length=1, max_length=50)</text:span></text:p>
      <text:list text:style-name="L5">
        <text:list-item>
          <text:p text:style-name="P6">Código del producto</text:p>
        </text:list-item>
      </text:list>
      <text:p text:style-name="P1"><text:span text:style-name="Source_20_Text">precio: Decimal = Field(..., ge=0)</text:span></text:p>
      <text:list text:style-name="L6">
        <text:list-item>
          <text:p text:style-name="P7">No permite valores negativos</text:p>
        </text:list-item>
      </text:list>
      <text:p text:style-name="P1"><text:span text:style-name="Source_20_Text">estatus: str = Field(default="activo")</text:span></text:p>
      <text:list text:style-name="L7">
        <text:list-item>
          <text:p text:style-name="P8">Valor por defecto</text:p>
        </text:list-item>
      </text:list>
      <text:h text:style-name="Heading_20_2" text:outline-level="2">4. ➕ ProductoCreate</text:h>
      <text:p text:style-name="Preformatted_20_Text"><text:span text:style-name="Source_20_Text">class ProductoCreate(ProductoBase):</text:span></text:p>
      <text:p text:style-name="P1"><text:span text:style-name="Source_20_Text"><text:s text:c="4"/>pass</text:span></text:p>
      <text:h text:style-name="Heading_20_3" text:outline-level="3">Función:</text:h>
      <text:list text:style-name="L8">
        <text:list-item>
          <text:p text:style-name="P9">Se usa para crear productos</text:p>
        </text:list-item>
        <text:list-item>
          <text:p text:style-name="P9">Hereda todas las validaciones</text:p>
        </text:list-item>
      </text:list>
      <text:h text:style-name="Heading_20_2" text:outline-level="2">5. 🔄 ProductoUpdate</text:h>
      <text:p text:style-name="P1"><text:span text:style-name="Source_20_Text">class ProductoUpdate(BaseModel):</text:span></text:p>
      <text:h text:style-name="Heading_20_3" text:outline-level="3">Característica clave:</text:h>
      <text:p text:style-name="Text_20_body">Todos los campos son opcionales</text:p>
      <text:p text:style-name="Text_20_body">Ejemplo:</text:p>
      <text:p text:style-name="P1"><text:span text:style-name="Source_20_Text">nombre: Optional[str] = Field(None, min_length=1, max_length=100)</text:span></text:p>
      <text:p text:style-name="Text_20_body">👉 Permite actualizar solo ciertos datos</text:p>
      <text:h text:style-name="Heading_20_2" text:outline-level="2">6. 📤 ProductoResponse</text:h>
      <text:p text:style-name="P1"><text:span text:style-name="Source_20_Text">class ProductoResponse(ProductoBase):</text:span></text:p>
      <text:p text:style-name="P1"><text:span text:style-name="Source_20_Text">model_config = ConfigDict(from_attributes=True)</text:span></text:p>
      <text:h text:style-name="Heading_20_3" text:outline-level="3">¿Qué hace?</text:h>
      <text:list text:style-name="L9">
        <text:list-item>
          <text:p text:style-name="P10">Convierte objetos SQLAlchemy a JSON automáticamente</text:p>
        </text:list-item>
      </text:list>
      <text:p text:style-name="P1"><text:span text:style-name="Source_20_Text">id_producto: int</text:span></text:p>
      <text:p text:style-name="Text_20_body"><text:soft-page-break/>👉 Incluye el ID en la respuesta</text:p>
      <text:h text:style-name="Heading_20_2" text:outline-level="2">7. 🔄 Flujo de Funcionamiento</text:h>
      <text:list text:style-name="L10">
        <text:list-item>
          <text:p text:style-name="P11">Cliente envía JSON</text:p>
        </text:list-item>
        <text:list-item>
          <text:p text:style-name="P11">Pydantic valida datos</text:p>
        </text:list-item>
        <text:list-item>
          <text:p text:style-name="P11">Si es correcto → pasa al backend</text:p>
        </text:list-item>
        <text:list-item>
          <text:p text:style-name="P11">Si falla → error automático</text:p>
        </text:list-item>
      </text:list>
      <text:h text:style-name="Heading_20_2" text:outline-level="2">8. 🧪 Cómo Agregar Nuevos Campos (Práctica)</text:h>
      <text:h text:style-name="Heading_20_3" text:outline-level="3">Caso práctico: agregar <text:span text:style-name="Source_20_Text">stock</text:span></text:h>
      <text:h text:style-name="Heading_20_4" text:outline-level="4">Paso 1: ProductoBase</text:h>
      <text:p text:style-name="P1"><text:span text:style-name="Source_20_Text">stock: int = Field(default=0, ge=0)</text:span></text:p>
      <text:h text:style-name="Heading_20_4" text:outline-level="4">Paso 2: ProductoUpdate</text:h>
      <text:p text:style-name="P1"><text:span text:style-name="Source_20_Text">stock: Optional[int] = Field(None, ge=0)</text:span></text:p>
      <text:h text:style-name="Heading_20_4" text:outline-level="4">Paso 3: ProductoResponse</text:h>
      <text:p text:style-name="P1"><text:span text:style-name="Source_20_Text">stock: int</text:span></text:p>
      <text:h text:style-name="Heading_20_3" text:outline-level="3">Caso práctico: agregar <text:span text:style-name="Source_20_Text">peso</text:span></text:h>
      <text:p text:style-name="P1"><text:span text:style-name="Source_20_Text">peso: Decimal = Field(..., ge=0)</text:span></text:p>
      <text:h text:style-name="Heading_20_3" text:outline-level="3">Caso práctico: campo opcional <text:span text:style-name="Source_20_Text">color</text:span></text:h>
      <text:p text:style-name="P1"><text:span text:style-name="Source_20_Text">color: Optional[str] = None</text:span></text:p>
      <text:h text:style-name="Heading_20_2" text:outline-level="2">9. ⚠️ Errores Comunes</text:h>
      <text:p text:style-name="Text_20_body">❌ No agregar el campo en todos los esquemas<text:line-break/>❌ Validaciones diferentes entre create y update<text:line-break/>❌ No usar Optional en updates</text:p>
      <text:h text:style-name="Heading_20_2" text:outline-level="2">10. 🧠 Regla Clave</text:h>
      <text:p text:style-name="Text_20_body">Cada campo nuevo debe existir en:</text:p>
      <text:list text:style-name="L11">
        <text:list-item>
          <text:p text:style-name="P12">Base</text:p>
        </text:list-item>
        <text:list-item>
          <text:p text:style-name="P12">Create (hereda)</text:p>
        </text:list-item>
        <text:list-item>
          <text:p text:style-name="P12"><text:soft-page-break/>Update (opcional)</text:p>
        </text:list-item>
        <text:list-item>
          <text:p text:style-name="P12">Response</text:p>
        </text:list-item>
      </text:list>
      <text:h text:style-name="Heading_20_2" text:outline-level="2">11. 🚀 Ejercicio Práctico</text:h>
      <text:p text:style-name="Text_20_body">Agrega los siguientes campos:</text:p>
      <text:list text:style-name="L12">
        <text:list-item>
          <text:p text:style-name="P13"><text:span text:style-name="Source_20_Text">activo</text:span> (bool)</text:p>
        </text:list-item>
        <text:list-item>
          <text:p text:style-name="P13"><text:span text:style-name="Source_20_Text">codigo_barras</text:span> (string)</text:p>
        </text:list-item>
      </text:list>
      <text:p text:style-name="Text_20_body">Luego prueba con JSON:</text:p>
      <text:p text:style-name="Preformatted_20_Text"><text:span text:style-name="Source_20_Text">{</text:span></text:p>
      <text:p text:style-name="Preformatted_20_Text"><text:span text:style-name="Source_20_Text"><text:s text:c="2"/>"nombre": "Mouse",</text:span></text:p>
      <text:p text:style-name="Preformatted_20_Text"><text:span text:style-name="Source_20_Text"><text:s text:c="2"/>"codigo": "M001",</text:span></text:p>
      <text:p text:style-name="Preformatted_20_Text"><text:span text:style-name="Source_20_Text"><text:s text:c="2"/>"precio": 150,</text:span></text:p>
      <text:p text:style-name="Preformatted_20_Text"><text:span text:style-name="Source_20_Text"><text:s text:c="2"/>"stock": 10</text:span></text:p>
      <text:p text:style-name="P1"><text:span text:style-name="Source_20_Text">}</text:span></text:p>
      <text:h text:style-name="Heading_20_2" text:outline-level="2">12. 📌 Conclusión</text:h>
      <text:p text:style-name="Text_20_body">Este archivo es clave para:</text:p>
      <text:list text:style-name="L13">
        <text:list-item>
          <text:p text:style-name="P14">Evitar errores en producción</text:p>
        </text:list-item>
        <text:list-item>
          <text:p text:style-name="P14">Validar datos correctamente</text:p>
        </text:list-item>
        <text:list-item>
          <text:p text:style-name="P14">Mantener orden en el backend</text:p>
        </text:list-item>
      </text:list>
      <text:p text:style-name="Text_20_body">👉 Dominar Pydantic te convierte en un backend sólid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7:05:32.470795193</meta:creation-date>
    <dc:date>2026-04-23T17:08:18.929446139</dc:date>
    <meta:editing-duration>PT2M47S</meta:editing-duration>
    <meta:editing-cycles>1</meta:editing-cycles>
    <meta:document-statistic meta:table-count="0" meta:image-count="0" meta:object-count="0" meta:page-count="4" meta:paragraph-count="94" meta:word-count="413" meta:character-count="2695" meta:non-whitespace-character-count="2393"/>
    <meta:generator>LibreOffice/24.2.7.2$Linux_X86_64 LibreOffice_project/420$Build-2</meta:generator>
  </office:meta>
</office:document-meta>
</file>